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a413"/>
    </style:style>
    <style:style style:name="T1" style:family="text">
      <style:text-properties officeooo:rsid="0009a413"/>
    </style:style>
    <style:style style:name="T2" style:family="text">
      <style:text-properties officeooo:rsid="000b516f"/>
    </style:style>
    <style:style style:name="T3" style:family="text">
      <style:text-properties officeooo:rsid="000c7a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iploma – TU Sofia<text:line-break/><text:line-break/></text:span>Orange Pi One H3 1G Quad-core Support – <text:span text:style-name="T1">Main SoC will act as controller for ESPS<text:line-break/>ESPS will control household furniture <text:s/>e.g. Lamps, A/C etc..<text:line-break/><text:line-break/>Main SoC should be accesible via Internet, should have a Website UI and a Mobile APP for controlling the household furniture.<text:line-break/><text:line-break/>ESPS should support OTA update in order to push changes &amp; updates. <text:line-break/>Main SoC will controll the OTA campaign.<text:line-break/><text:line-break/><text:line-break/></text:span><text:span text:style-name="T2">Main SoC will run flask with gunicorn </text:span><text:span text:style-name="T3">for the Site.</text:span><text:span text:style-name="T2"><text:line-break/><text:line-break/>flask app will act as a site<text:line-break/><text:line-break/>gunicorn is the server<text:line-break/><text:line-break/>Start up gunicorn -b 0.0.0.0:5000 app:ap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2:16:48.424193488</meta:creation-date>
    <dc:date>2026-01-24T20:45:02.977724203</dc:date>
    <meta:editing-duration>PT12M54S</meta:editing-duration>
    <meta:editing-cycles>3</meta:editing-cycles>
    <meta:generator>LibreOffice/24.2.2.2$Linux_X86_64 LibreOffice_project/420$Build-2</meta:generator>
    <meta:document-statistic meta:table-count="0" meta:image-count="0" meta:object-count="0" meta:page-count="1" meta:paragraph-count="1" meta:word-count="94" meta:character-count="549" meta:non-whitespace-character-count="444"/>
  </office:meta>
</office:document-meta>
</file>