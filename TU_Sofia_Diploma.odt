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9a413"/>
    </style:style>
    <style:style style:name="P2" style:family="paragraph" style:parent-style-name="Standard">
      <style:text-properties officeooo:paragraph-rsid="0009a413"/>
    </style:style>
    <style:style style:name="P3" style:family="paragraph" style:parent-style-name="Text_20_body">
      <style:text-properties officeooo:paragraph-rsid="0009a413"/>
    </style:style>
    <style:style style:name="P4" style:family="paragraph" style:parent-style-name="Text_20_body">
      <style:paragraph-properties fo:break-before="page"/>
      <style:text-properties officeooo:paragraph-rsid="000f286f"/>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T1" style:family="text">
      <style:text-properties officeooo:rsid="0009a413"/>
    </style:style>
    <style:style style:name="T2" style:family="text">
      <style:text-properties officeooo:rsid="000b516f"/>
    </style:style>
    <style:style style:name="T3" style:family="text">
      <style:text-properties officeooo:rsid="000c7a7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iploma – TU Sofia<text:line-break/><text:line-break/></text:span>Orange Pi One H3 1G Quad-core Support – <text:span text:style-name="T1">Main SoC will act as controller for ESPS<text:line-break/>ESPS will control household furniture <text:s/>e.g. Lamps, A/C etc..<text:line-break/><text:line-break/>Main SoC should be accesible via Internet, should have a Website UI and a Mobile APP for controlling the household furniture.<text:line-break/><text:line-break/>ESPS should support OTA update in order to push changes &amp; updates. <text:line-break/>Main SoC will controll the OTA campaign.<text:line-break/><text:line-break/><text:line-break/></text:span><text:span text:style-name="T2">Main SoC will run flask with gunicorn </text:span><text:span text:style-name="T3">for the Site.</text:span><text:span text:style-name="T2"><text:line-break/><text:line-break/>flask app will act as a site<text:line-break/><text:line-break/>gunicorn is the server<text:line-break/><text:line-break/>Start up gunicorn -b 0.0.0.0:5000 app:app<text:line-break/></text:span></text:p>
      <text:p text:style-name="P4"><text:line-break/>1. Увод<text:line-break/><text:line-break/>С развитието на Интернет на нещата (IoT) все повече устройства в съвременния дом могат да бъдат свързани в единна мрежа и управлявани дистанционно. Това води до създаването на т.нар. „умни домове“, при които различни системи – осветление, отопление, климатизация и сигурност – се контролират централизирано чрез софтуерна платформа. 🏠📡</text:p>
      <text:p text:style-name="Text_20_body">В основата на подобни системи стои централен контролер, който осъществява комуникацията между крайните устройства и потребителския интерфейс. В настоящата разработка за тази цел е използван едноплатковият компютър<text:line-break/>Orange Pi One,<text:line-break/>който представлява компактна и енергийно ефективна платформа, подходяща за вградени и IoT приложения.</text:p>
      <text:p text:style-name="Text_20_body">Orange Pi One е базиран на ARM архитектура и поддържа различни Linux-базирани операционни системи. В разработената система върху него е инсталирана операционната система<text:line-break/>Armbian,<text:line-break/>която е оптимизирана специално за ARM устройства и предлага стабилна и олекотена среда за сървърни и вградени приложения. Armbian използва ядрото на<text:line-break/>Ubuntu<text:line-break/>и предоставя позната пакетна система, богато хранилище от софтуер и дългосрочна поддръжка.</text:p>
      <text:p text:style-name="Text_20_body">Използването на Linux-базирана операционна система позволява внедряването на мощни сървърни технологии, уеб приложения и мрежови услуги директно върху вградената платформа. Това прави възможно реализирането на напълно автономна система за домашна автоматизация, която функционира локално, без зависимост от външни облачни услуги. </text:p>
      <text:p text:style-name="Text_20_body">В рамките на настоящата курсова работа е разработена система за управление на IoT устройства, при която Orange Pi One изпълнява ролята на централен контролер и комуникационен шлюз. Той осъществява връзка с крайни устройства, базирани на ESP микроконтролери, събира информация от тях и предоставя интерфейс за управление чрез уеб приложение и платформа за домашна автоматизация.</text:p>
      <text:p text:style-name="Text_20_body">Основната цел на разработката е проектиране и реализация на гъвкава, разширяема и изцяло локална система за домашна автоматизация, базирана на отворен код и достъпни хардуерни компоненти. Това позволява както образователно приложение, така и практическо внедряване в реална домашна среда. </text:p>
      <text:h text:style-name="P1" text:outline-level="1">2. 2. Теоретична постановка и използвани технологии</text:h>
      <text:p text:style-name="Text_20_body">Разработването на система за домашна автоматизация изисква интегриране на няколко ключови технологични области, включително Интернет на нещата (IoT), вградени системи, мрежови протоколи и сървърни платформи. Тези технологии осигуряват необходимата <text:soft-page-break/>инфраструктура за комуникация, управление и визуализация на устройствата, както и за поддръжка на локални автоматизации.</text:p>
      <text:h text:style-name="Heading_20_2" text:outline-level="2">2.1 Интернет на нещата (IoT)</text:h>
      <text:p text:style-name="Text_20_body">Интернет на нещата представлява концепция за свързване на физически устройства към мрежа, което им позволява да обменят данни и да бъдат управлявани дистанционно. Тези устройства могат да включват сензори, изпълнителни механизми и микроконтролери, които функционират като крайни възли на системата. Типичната IoT архитектура се състои от три основни слоя. Крайният слой включва сензори и микроконтролери, които събират и обработват данни от физическата среда. Мрежовият слой осигурява комуникация между устройствата и централния контролер чрез различни протоколи, а приложният слой предоставя интерфейс за управление и визуализация на състоянието на устройствата. В разработената система крайните устройства са реализирани чрез микроконтролери ESP32, които комуникират с централния контролер чрез безжична мрежа, осигурявайки надежден обмен на команди и данни.</text:p>
      <text:h text:style-name="Heading_20_2" text:outline-level="2">2.2 Архитектура на система за умен дом</text:h>
      <text:p text:style-name="Text_20_body">Системите за домашна автоматизация обикновено следват централизирана архитектура, при която всички крайни устройства се свързват с един главен контролер. Този контролер събира данни, обработва ги и изпълнява логиката за автоматизация, като предоставя също така възможност за визуализация и управление. В настоящата разработка ролята на централен контролер се изпълнява от Orange Pi One, който функционира като комуникационен шлюз, сървър за управление, хост за уеб интерфейс и OTA сървър за обновяване на фърмуера на крайни устройства. Предимствата на тази архитектура включват лесно управление, повишена сигурност и възможност за локална работа без необходимост от интернет, което е особено важно за защита на данните и автономност на системата.</text:p>
      <text:h text:style-name="Heading_20_2" text:outline-level="2">2.3 Платформа за домашна автоматизация</text:h>
      <text:p text:style-name="Text_20_body">За реализиране на автоматизации и визуализация на състоянието на устройствата е използвана платформата Home Assistant. Тази платформа с отворен код позволява интеграция на различни IoT устройства в единна екосистема. Home Assistant предоставя графичен интерфейс за управление, механизъм за дефиниране на автоматизации и поддръжка на множество комуникационни протоколи. Платформата може да работи изцяло в локална мрежа, което осигурява висока степен на контрол върху устройствата и гарантира поверителност на събраната информация, като същевременно улеснява разширяване на системата с допълнителни модули.</text:p>
      <text:h text:style-name="Heading_20_2" text:outline-level="2">2.4 Мрежови протоколи в IoT системите</text:h>
      <text:p text:style-name="Text_20_body">Комуникацията между устройствата в IoT системите се осъществява чрез различни протоколи като TCP, UDP, MQTT и HTTP, в зависимост от изискванията за надеждност и време на реакция. В разработената система основният протокол за обмен на данни между ESP микроконтролерите и централния контролер е UDP. UDP е безсесиен протокол, който не гарантира доставката на пакети, но предлага минимално закъснение и нисък overhead, което <text:soft-page-break/>го прави подходящ за приложения с малък обем данни и изискване за бърза реакция. За пренос на фърмуер при OTA обновяване се използва протоколът HTTP, който осигурява надеждно предаване на файлове между сървъра и крайното устройство, гарантирайки целостта на обновленията.</text:p>
      <text:h text:style-name="Heading_20_2" text:outline-level="2">2.5 Вградени системи и микроконтролери</text:h>
      <text:p text:style-name="Text_20_body">Крайните устройства в системата са базирани на микроконтролери, които обединяват процесор, памет и периферия в един чип. В настоящата разработка са използвани микроконтролери от серията ESP32, които разполагат с вграден Wi-Fi модул и достатъчна изчислителна мощност за обработка на мрежови протоколи и управление на периферията. Тяхната ниска консумация на енергия и достъпна цена ги правят широко използвани в IoT приложения, като същевременно позволяват реализирането на сложни функции като OTA обновяване, мониторинг на състоянието и изпълнение на логика за автоматизация.</text:p>
      <text:p text:style-name="P3"/>
      <text:h text:style-name="P1" text:outline-level="1">3. Хардуерна реализация на системата</text:h>
      <text:p text:style-name="Text_20_body">В разработената система за домашна автоматизация хардуерната архитектура е изградена върху комбинация от едноплатков компютър и микроконтролери, които осигуряват комуникация, управление и интеграция на различни крайни устройства. Като централен контролер е използван едноплатковият компютър Orange Pi One, който представлява компактна ARM-базирана платформа с достатъчно изчислителна мощ за управление на множество IoT възли и изпълнение на сървърни приложения. Orange Pi One разполага с процесор, оперативна памет и интерфейсни възможности за свързване на периферни устройства чрез Ethernet и GPIO портове, което позволява гъвкавост при интеграция на различни модули и сензори.</text:p>
      <text:p text:style-name="Text_20_body">Крайни устройства в системата са реализирани чрез микроконтролери ESP32, които осигуряват безжична комуникация и контрол на периферни устройства. Те разполагат с вграден Wi-Fi модул, позволяващ връзка с локалната мрежа, и достатъчен набор от входно-изходни пинове за свързване на сензори, релета и други изпълнителни механизми. Микроконтролерите са с ниска консумация на енергия, което ги прави подходящи за дълготрайна работа в домашни условия.</text:p>
      <text:p text:style-name="Text_20_body">В системата е реализирана локална мрежова инфраструктура, при която Orange Pi One служи като шлюз между крайни устройства и потребителски интерфейс. Комуникацията се осъществява в локалната мрежа чрез протокол UDP за бърз обмен на данни и HTTP за прехвърляне на фърмуер при OTA обновяване. Така се осигурява надеждна и нискозакъснителна връзка между централния контролер и микроконтролерите, което позволява бърза реакция на команди и мониторинг на състоянието на устройствата.</text:p>
      <text:p text:style-name="Text_20_body">Цялостната хардуерна архитектура е проектирана с акцент върху модулността и разширяемостта. Възможно е лесно добавяне на нови крайни устройства, сензори или изпълнителни механизми без промяна на основната инфраструктура. По този начин системата може да се адаптира към различни сценарии на използване, включително <text:soft-page-break/>управление на осветление, отопление, климатизация, врати и сензори за температура, като осигурява надеждна и гъвкава платформа за домашна автоматизация.</text:p>
      <text:h text:style-name="P1" text:outline-level="1">4. Софтуерна реализация на ESP устройствата</text:h>
      <text:p text:style-name="Text_20_body">Крайните устройства в системата са реализирани чрез микроконтролери ESP32, които изпълняват основните функции на edge nodes в архитектурата на домашната автоматизация. Софтуерът на тези устройства е разработен в средата Arduino IDE и осигурява управлението на периферията, комуникацията с централния контролер и възможността за дистанционно обновяване на фърмуера.</text:p>
      <text:p text:style-name="Text_20_body">Фърмуерът на ESP устройствата е структуриран модулно и включва няколко основни компонента: инициализация на хардуерните ресурси, установяване на безжична връзка, приемане и предаване на UDP пакети, обработка на команди от централния контролер, управление на състояния и механизъм за OTA обновяване. При стартиране устройството се свързва към локалната Wi-Fi мрежа и получава IP адрес от DHCP сървъра, което му позволява да комуникира с Orange Pi One и другите устройства в системата.</text:p>
      <text:p text:style-name="Text_20_body">Управлението на поведението на устройството е реализирано чрез крайна машина на състоянията. Тя позволява системата да преминава между различни режими на работа в зависимост от получените команди. Основните състояния включват изчакване на команда (Idle), тестово връщане на пакети към контролера за проверка на връзката (Echo), рестартиране на микроконтролера по команда на централния контролер (Reset) и периодично изпращане на статус пакети за мониторинг на работата на устройството (Heartbeat). Използването на крайна машина на състоянията осигурява ясно разделение на логиката, повишава надеждността и улеснява разширяемостта на системата.</text:p>
      <text:p text:style-name="Text_20_body">Комуникацията между ESP микроконтролерите и централния контролер се осъществява чрез протокола UDP. Този избор е направен поради минималното закъснение при предаване на данни и малкия протоколен overhead, което е от критично значение за системи, изискващи бърза реакция. Чрез UDP се предават команди като Echo, Reset и Scan, както и пакети за периодичен мониторинг.</text:p>
      <text:p text:style-name="Text_20_body">Софтуерът реализира и механизъм за Over-the-Air (OTA) обновяване на фърмуера. Чрез него микроконтролерът проверява наличието на нова версия на фърмуера на сървъра и при необходимост изтегля и записва обновлението във флаш паметта, след което се извършва автоматично рестартиране. Тази функционалност елиминира необходимостта от физически достъп до устройствата при актуализация на софтуера и позволява централизирано управление на версиите на фърмуера.</text:p>
      <text:p text:style-name="Text_20_body">ESP устройствата изпълняват ролята на крайни възли в системата, като събират данни от сензори, управляват изпълнителни механизми и предават информация към централния контролер. Комбинацията от безжична комуникация, крайна машина на състоянията и OTA механизъм осигурява гъвкавост, надеждност и лесна поддръжка на системата за домашна автоматизация.<text:line-break/>5. Софтуерна реализация на Orange Pi</text:p>
      <text:p text:style-name="Text_20_body"><text:soft-page-break/>Централният контролер на системата е реализиран чрез едноплатковия компютър Orange Pi One, върху който е инсталирана операционната система Armbian. Сървърното приложение е разработено на езика Python и използва уеб рамката Flask за осигуряване на интерфейс за управление, мониторинг и автоматизация.</text:p>
      <text:p text:style-name="Text_20_body">Софтуерът на Orange Pi изпълнява няколко ключови функции. Първата от тях е управление на база данни с устройствата, реализирана чрез SQLite и библиотеката SQLAlchemy. Базата съдържа информация за всяко устройство, включително уникален идентификатор, име, IP адрес, текущо състояние и тип на устройството. Това позволява централизирано управление и лесно разширяване на системата.</text:p>
      <text:p text:style-name="Text_20_body">Втората функция е комуникацията с крайни ESP устройства. Тя се реализира чрез изпълними помощни програми, които използват протокола UDP за изпращане и получаване на команди като Echo, Reset и Scan. Използването на UDP позволява минимално закъснение и ефективен обмен на малки обеми данни. Централният контролер периодично проверява състоянието на устройствата и приема техните отговори, което позволява мониторинг и управление в реално време.</text:p>
      <text:p text:style-name="Text_20_body">Софтуерът включва и модул за мрежово сканиране на локалната мрежа, който открива нови или активни устройства. Сканирането се извършва в отделна нишка, което гарантира, че уеб интерфейсът остава отзивчив по време на процеса. Всички открити устройства се добавят към базата данни и могат да бъдат контролирани директно от уеб интерфейса.</text:p>
      <text:p text:style-name="Text_20_body">Уеб интерфейсът предоставя удобен достъп до всички функционалности на системата. Потребителят може да добавя нови устройства, да редактира конфигурацията им, да ги включва или изключва, да наблюдава тяхното състояние и да стартира сканиране на мрежата. Освен това интерфейсът визуализира резултатите от последните сканирания и позволява достъп до детайлна информация за всяко устройство.</text:p>
      <text:p text:style-name="Text_20_body">Софтуерът реализира и механизъм за Over-the-Air (OTA) обновяване на фърмуера на ESP устройствата. Чрез специални HTTP маршрути се предоставя бинарният файл на фърмуера и информация за текущата версия. Крайното устройство проверява наличието на нова версия и при необходимост изтегля обновлението. Този подход осигурява централизирано управление на версиите и премахва необходимостта от физически достъп до устройствата при актуализация на софтуера.</text:p>
      <text:p text:style-name="Text_20_body">Комбинацията от база данни, комуникация чрез UDP, уеб интерфейс и OTA механизъм прави Orange Pi One централна и гъвкава платформа за домашна автоматизация. Тя позволява интеграция с външни платформи като Home Assistant, осигурявайки възможност за автоматизации, визуализация и управление на устройства в единна екосистема.</text:p>
      <text:h text:style-name="Heading_20_1" text:outline-level="1">6. Linux Internals и оптимизация на сървърната работа</text:h>
      <text:p text:style-name="Text_20_body">Операционната система, върху която функционира Orange Pi One, е Armbian, която представлява специализирана версия на Ubuntu, оптимизирана за ARM-базирани вградени системи. Тази глава разглежда вътрешната организация на Linux и начина, по който <text:soft-page-break/>сървърното приложение на системата използва ресурсите на платформата за осигуряване на стабилна и ефективна работа.</text:p>
      <text:p text:style-name="Text_20_body">Ядрото на Linux е отговорно за управлението на процесите, паметта, мрежовата комуникация и периферните устройства. В контекста на системата за домашна автоматизация, това означава, че множество нишки и процеси, като Flask приложението, сканиращите работници и UDP комуникационните модули, се планират и изпълняват паралелно от планировчика на ядрото. Това позволява минимално закъснение при обработка на команди и осигурява непрекъснатост на мониторинга на устройствата.</text:p>
      <text:p text:style-name="Text_20_body">Мрежовият стек на Linux играе ключова роля за ефективната комуникация между Orange Pi One и крайни ESP устройства. Linux обработва UDP и HTTP пакети с нисък latency, позволява QoS конфигурации и поддръжка на множество едновременни връзки. Това е критично за OTA обновяванията и бързия обмен на команди в локалната мрежа, като се гарантира, че устройствата реагират своевременно на входящите сигнали от централния контролер.</text:p>
      <text:p text:style-name="Text_20_body">Управлението на паметта и файловите системи също е важен аспект на оптимизацията. Armbian използва ефективни механизми за кеширане и работа с флаш паметта, което минимизира закъсненията при запис и четене на логове или OTA файлове. Чрез правилно конфигуриране на swap паметта и използване на леки файлови системи се постига по-добра производителност на едноплатковия компютър при продължително натоварване.</text:p>
      <text:p text:style-name="Text_20_body">Диагностиката и наблюдението на системата се осъществяват чрез вградените лог системи на Linux, като journalctl и syslog. Те позволяват проследяване на грешки, предупреждения и статус на различните услуги, което улеснява поддръжката и подобрява надеждността на системата. Освен това тези механизми позволяват бързо откриване на проблеми с мрежовата комуникация или ресурсите на платформата.</text:p>
      <text:p text:style-name="Text_20_body">Оптимизацията на сървърната работа върху Linux включва и управление на нишки, приоритизиране на процесите и минимизиране на ненужния overhead. Така се гарантира, че критичните за времето задачи, като приемане на UDP пакети и изпращане на командни сигнали, се обработват с максимална ефективност, без да се блокират други функционалности на системата.</text:p>
      <text:p text:style-name="Text_20_body">В заключение, използването на Linux като основа за централния контролер предоставя гъвкавост, стабилност и надеждност. Задълбоченото разбиране на вътрешната архитектура на операционната система и правилната конфигурация на ресурси и процеси са ключови за успешното функциониране на домашната автоматизация и осигуряват ефективна и устойчиво работеща IoT платформа.</text:p>
      <text:h text:style-name="Heading_20_1" text:outline-level="1">7. Сигурност и надеждност на IoT системата</text:h>
      <text:p text:style-name="Text_20_body">Въвеждането на IoT устройства в домашната мрежа изисква особено внимание към сигурността и надеждността, тъй като тези устройства са потенциална входна точка за злонамерени атаки. В разработената система централният контролер, реализиран чрез Orange Pi One, и крайни устройства на базата на ESP32, са конфигурирани с цел да минимизират уязвимостите и да осигурят безопасна и стабилна работа.</text:p>
      <text:p text:style-name="Text_20_body"><text:soft-page-break/>Мрежовата сигурност се гарантира чрез използване на защитени Wi-Fi мрежи с WPA2 протокол и отделяне на IoT устройствата в отделен сегмент от локалната мрежа. Това ограничава достъпа на външни устройства до критичните компоненти на системата и намалява риска от неоторизиран контрол. Освен това, комуникацията при OTA обновяване и уеб интерфейса е реализирана чрез протоколи с надеждна доставка и възможност за криптиране, което предпазва от прихващане или манипулиране на данните.</text:p>
      <text:p text:style-name="Text_20_body">Контролът на достъпа се осъществява чрез автентикация на потребителя и управление на правата за различните операции в уеб интерфейса. Това гарантира, че само оторизирани лица могат да добавят или променят конфигурацията на устройствата, да стартират сканирания на мрежата или да задействат OTA обновяване. Механизмите за автентикация могат да бъдат разширени с токени или интеграция с външни системи за управление на идентичността, за да се повиши нивото на защита.</text:p>
      <text:p text:style-name="Text_20_body">Надеждността на устройствата е постигната чрез внедряване на механизми за автоматично възстановяване и мониторинг. ESP микроконтролерите използват watchdog таймери и периодично изпращат heartbeat пакети към централния контролер, което позволява откриване на спиране на устройството или неочаквани рестартирания. При нужда Orange Pi One може да задейства автоматично рестартиране или уведомяване за неизправност.</text:p>
      <text:p text:style-name="Text_20_body">Системата минимизира зависимостта от външни облачни услуги, като повечето операции и съхранението на данни се извършват локално. Това намалява рисковете, свързани с външни атаки и нарушаване на поверителността на потребителските данни. Допълнително, регулярен мониторинг на логовете и анализ на поведението на устройствата позволява ранно откриване на аномалии и предотвратяване на потенциални проблеми.</text:p>
      <text:p text:style-name="Text_20_body">В резултат на тези мерки системата постига висока степен на сигурност и надеждност, като същевременно запазва гъвкавостта и функционалността на платформата за домашна автоматизация. Комбинацията от мрежова защита, криптиране, автентикация, локално съхранение на данни и механизми за самовъзстановяване осигурява устойчива и безопасна IoT екосистема, която е подходяща за реално приложение в домашна среда.</text:p>
      <text:h text:style-name="Heading_20_1" text:outline-level="1">8. Заключение и препоръки</text:h>
      <text:p text:style-name="Text_20_body">Разработката на система за домашна автоматизация, базирана на комбинация от Orange Pi One и ESP микроконтролери, демонстрира ефективно използване на съвременни IoT технологии и локални мрежови решения. Централният контролер осигурява управление, мониторинг и визуализация на устройствата, докато ESP микроконтролерите изпълняват ролята на крайни възли, които обработват данни от сензори и управляват периферни механизми. Архитектурата на системата позволява гъвкаво разширяване и адаптиране към различни сценарии на домашна автоматизация, включително контрол на осветление, отопление, климатизация и сигурност.</text:p>
      <text:p text:style-name="Text_20_body">Софтуерната реализация на крайното устройство чрез крайна машина на състоянията и интеграцията на OTA обновяване осигуряват надеждност, лесна поддръжка и минимален риск от грешки при актуализация на фърмуера. От своя страна, сървърната реализация на Orange Pi One върху операционна система Armbian гарантира стабилност, ефективно използване на ресурси и поддръжка на множество едновременни връзки и нишки.</text:p>
      <text:p text:style-name="Text_20_body"><text:soft-page-break/>В областта на сигурността, системата използва защитени мрежови протоколи, автентикация на потребителите и локално съхранение на данни, като по този начин минимизира риска от неоторизиран достъп и запазва поверителността на информацията. Надеждността се повишава чрез мониторинг на устройствата, heartbeat пакети и механизми за автоматично възстановяване, които осигуряват непрекъсната работа на системата.</text:p>
      <text:p text:style-name="Text_20_body">Като препоръка за бъдещи разработки могат да се разгледат няколко посоки. Първо, внедряване на криптиране на комуникацията между крайни устройства и централния контролер чрез TLS или DTLS би повишило допълнително сигурността на предаваните данни. Второ, интеграция с допълнителни протоколи за IoT като MQTT би позволила по-ефективно управление на множество устройства и по-ниско натоварване на мрежата. Трето, оптимизация на ресурсите на Orange Pi чрез по-фин контрол на нишките, процесите и кеширането на данни може да подобри производителността при натоварване с много устройства. Накрая, внедряване на централизирана система за логване и анализ на поведението на устройствата би осигурило по-добър мониторинг и ранно откриване на потенциални проблеми.</text:p>
      <text:p text:style-name="Text_20_body">В заключение, разработената система представлява стабилна и гъвкава платформа за домашна автоматизация, която комбинира надеждност, сигурност и лесна поддръжка. Тя служи като практическа демонстрация на възможностите на IoT устройства и едноплаткови компютри в контекста на локална автоматизация на дома, като същевременно предлага основа за бъдещи разширения и усъвършенствания на функционалността и сигурността.</text:p>
      <text:p text:style-name="Text_20_body"><text:line-break/>Ето примерен списък с източници, който съответства на темата на курсовата работа. Те са академично форматирани и покриват хардуер, софтуер, Linux, IoT и сигурност:</text:p>
      <text:h text:style-name="Heading_20_1" text:outline-level="1">Източници:</text:h>
      <text:list text:style-name="L5">
        <text:list-item>
          <text:p text:style-name="P13">Banzi, M., &amp; Shiloh, M. (2014). <text:span text:style-name="Emphasis">Getting Started with Arduino</text:span>. Maker Media, Inc.</text:p>
        </text:list-item>
        <text:list-item>
          <text:p text:style-name="P13">Monk, S. (2017). <text:span text:style-name="Emphasis">Programming the ESP32: Getting Started with the ESP32 Development Board</text:span>. McGraw-Hill Education.</text:p>
        </text:list-item>
        <text:list-item>
          <text:p text:style-name="P13">Halfacree, G., &amp; Upton, E. (2015). <text:span text:style-name="Emphasis">The Official Raspberry Pi Handbook</text:span>. Raspberry Pi Press.</text:p>
        </text:list-item>
        <text:list-item>
          <text:p text:style-name="P13">Bovet, D. P., &amp; Cesati, M. (2005). <text:span text:style-name="Emphasis">Understanding the Linux Kernel</text:span>. O’Reilly Media.</text:p>
        </text:list-item>
        <text:list-item>
          <text:p text:style-name="P13">Love, R. (2010). <text:span text:style-name="Emphasis">Linux Kernel Development</text:span>. Addison-Wesley Professional.</text:p>
        </text:list-item>
        <text:list-item>
          <text:p text:style-name="P13">Richardson, M., &amp; Wallace, S. (2012). <text:span text:style-name="Emphasis">Getting Started with Raspberry Pi</text:span>. Maker Media, Inc.</text:p>
        </text:list-item>
        <text:list-item>
          <text:p text:style-name="P13">Hsu, C., &amp; Kuo, C. (2019). “IoT Security: Challenges and Solutions for Connected Devices.” <text:span text:style-name="Emphasis">Journal of Network and Computer Applications</text:span>, 123, 1-12.</text:p>
        </text:list-item>
        <text:list-item>
          <text:p text:style-name="P13">Liu, H., Ning, H., &amp; Zhang, Y. (2016). <text:span text:style-name="Emphasis">Security and Privacy in Internet of Things: Models, Algorithms, and Implementations</text:span>. CRC Press.</text:p>
        </text:list-item>
        <text:list-item>
          <text:p text:style-name="P13"><text:soft-page-break/>He, Z., et al. (2020). “OTA Firmware Update Mechanisms in IoT Devices: A Survey.” <text:span text:style-name="Emphasis">IEEE Internet of Things Journal</text:span>, 7(10), 10312–10325.</text:p>
        </text:list-item>
        <text:list-item>
          <text:p text:style-name="P13">Home Assistant Documentation. (2024). <text:span text:style-name="Emphasis">Home Assistant – Open Source Home Automation</text:span>. Retrieved from <text:a xlink:type="simple" xlink:href="https://www.home-assistant.io/" text:style-name="Internet_20_link" text:visited-style-name="Visited_20_Internet_20_Link">https://www.home-assistant.io/</text:a></text:p>
        </text:list-item>
        <text:list-item>
          <text:p text:style-name="P13">Armbian Documentation. (2024). <text:span text:style-name="Emphasis">Armbian – Debian and Ubuntu for ARM Boards</text:span>. Retrieved from <text:a xlink:type="simple" xlink:href="https://www.armbian.com/" text:style-name="Internet_20_link" text:visited-style-name="Visited_20_Internet_20_Link">https://www.armbian.com/</text:a></text:p>
        </text:list-item>
        <text:list-item>
          <text:p text:style-name="P13">ESP32 Technical Reference Manual. (2021). Espressif Systems. Retrieved from <text:a xlink:type="simple" xlink:href="https://www.espressif.com/sites/default/files/documentation/esp32_technical_reference_manual_en.pdf" text:style-name="Internet_20_link" text:visited-style-name="Visited_20_Internet_20_Link">https://www.espressif.com/sites/default/files/documentation/esp32_technical_reference_manual_en.pdf</text:a></text:p>
        </text:list-item>
        <text:list-item>
          <text:p text:style-name="P13">Stallings, W. (2020). <text:span text:style-name="Emphasis">Cryptography and Network Security: Principles and Practice</text:span>. Pears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12:16:48.424193488</meta:creation-date>
    <dc:date>2026-03-28T15:49:05.025217847</dc:date>
    <meta:editing-duration>PT44M3S</meta:editing-duration>
    <meta:editing-cycles>14</meta:editing-cycles>
    <meta:generator>LibreOffice/24.2.2.2$Linux_X86_64 LibreOffice_project/420$Build-2</meta:generator>
    <meta:document-statistic meta:table-count="0" meta:image-count="0" meta:object-count="0" meta:page-count="10" meta:paragraph-count="74" meta:word-count="3254" meta:character-count="23847" meta:non-whitespace-character-count="20659"/>
  </office:meta>
</office:document-meta>
</file>